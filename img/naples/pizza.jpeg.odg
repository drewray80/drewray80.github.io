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B17ED7FDB60.jpg" manifest:media-type="image/jpeg"/>
  <manifest:file-entry manifest:full-path="Pictures/100000000000038D0000051AA26B2306.jpg" manifest:media-type="image/jpeg"/>
  <manifest:file-entry manifest:full-path="Pictures/1000000000000BD000000FC07B8BCBD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loext:softedge-radius="0.10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loext:softedge-radius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811cm" svg:height="29.081cm" svg:x="-0.122cm" svg:y="-0.636cm">
          <draw:image xlink:href="Pictures/1000000000000BD000000FC07B8BCBDF.jpg" xlink:type="simple" xlink:show="embed" xlink:actuate="onLoad" draw:mime-type="image/jpeg">
            <text:p/>
          </draw:image>
        </draw:frame>
        <draw:frame draw:style-name="gr2" draw:text-style-name="P1" draw:layer="layout" svg:width="6.409cm" svg:height="9.208cm" svg:x="14.911cm" svg:y="18.462cm">
          <draw:image xlink:href="Pictures/100000000000038D0000051AA26B2306.jpg" xlink:type="simple" xlink:show="embed" xlink:actuate="onLoad" draw:mime-type="image/jpeg">
            <text:p/>
          </draw:image>
        </draw:frame>
        <draw:frame draw:style-name="gr3" draw:text-style-name="P1" draw:layer="layout" svg:width="9.808cm" svg:height="9.208cm" svg:x="0cm" svg:y="18.732cm">
          <draw:image xlink:href="Pictures/1000000000000BD000000B17ED7FDB6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6T15:17:09.186080209</meta:creation-date>
    <dc:date>2026-06-26T15:28:27.386639084</dc:date>
    <meta:editing-duration>PT9M55S</meta:editing-duration>
    <meta:editing-cycles>3</meta:editing-cycles>
    <meta:generator>LibreOffice/24.2.7.2$Linux_X86_64 LibreOffice_project/420$Build-2</meta:generator>
    <meta:document-statistic meta:object-count="3"/>
  </office:meta>
</office:document-meta>
</file>