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64C0DD88.jpg" manifest:media-type="image/jpeg"/>
  <manifest:file-entry manifest:full-path="Pictures/1000000000000FC000000BD0CAA8C59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_20_with_20_no_20_fill_20_and_20_no_20_line">
      <style:graphic-properties draw:textarea-horizontal-align="center" draw:textarea-vertical-align="middle" loext:softedge-radius="0.141cm" draw:color-mode="standard" draw:luminance="0%" draw:contrast="0%" draw:gamma="100%" draw:red="0%" draw:green="0%" draw:blue="0%" fo:clip="rect(26.675cm, 19.733cm, 54.899cm, 27.32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37cm" svg:height="6.047cm" svg:x="18.733cm" svg:y="0.62cm">
          <draw:image xlink:href="Pictures/1000000000000BD000000FC064C0DD8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FC000000BD0CAA8C59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6T15:35:24.080467171</meta:creation-date>
    <dc:date>2026-06-26T15:40:11.468883550</dc:date>
    <meta:editing-duration>PT4M48S</meta:editing-duration>
    <meta:editing-cycles>1</meta:editing-cycles>
    <meta:document-statistic meta:object-count="1"/>
    <meta:generator>LibreOffice/24.2.7.2$Linux_X86_64 LibreOffice_project/420$Build-2</meta:generator>
  </office:meta>
</office:document-meta>
</file>